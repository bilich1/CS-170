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ableColumn4" style:family="table-column">
      <style:table-column-properties style:column-width="0.6in" style:use-optimal-column-width="false"/>
    </style:style>
    <style:style style:name="TableColumn5" style:family="table-column">
      <style:table-column-properties style:column-width="0.627in" style:use-optimal-column-width="false"/>
    </style:style>
    <style:style style:name="TableColumn6" style:family="table-column">
      <style:table-column-properties style:column-width="1.0756in" style:use-optimal-column-width="false"/>
    </style:style>
    <style:style style:name="TableColumn7" style:family="table-column">
      <style:table-column-properties style:column-width="0.5756in" style:use-optimal-column-width="false"/>
    </style:style>
    <style:style style:name="TableColumn8" style:family="table-column">
      <style:table-column-properties style:column-width="0.5368in" style:use-optimal-column-width="false"/>
    </style:style>
    <style:style style:name="TableColumn9" style:family="table-column">
      <style:table-column-properties style:column-width="1.1916in" style:use-optimal-column-width="false"/>
    </style:style>
    <style:style style:name="TableColumn10" style:family="table-column">
      <style:table-column-properties style:column-width="1.1506in" style:use-optimal-column-width="false"/>
    </style:style>
    <style:style style:name="TableColumn11" style:family="table-column">
      <style:table-column-properties style:column-width="0.577in" style:use-optimal-column-width="false"/>
    </style:style>
    <style:style style:name="TableColumn12" style:family="table-column">
      <style:table-column-properties style:column-width="0.5902in" style:use-optimal-column-width="false"/>
    </style:style>
    <style:style style:name="Table3" style:family="table">
      <style:table-properties style:width="6.925in" fo:margin-left="0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 style:parent-style-name="TableContents" style:family="paragraph">
      <style:paragraph-properties fo:text-align="center"/>
    </style:style>
    <style:style style:name="TableCell16" style:family="table-cell">
      <style:table-cell-properties fo:border="0.0069in solid #000000" style:writing-mode="lr-tb" fo:padding-top="0.0381in" fo:padding-left="0.0381in" fo:padding-bottom="0.0381in" fo:padding-right="0.0381in"/>
    </style:style>
    <style:style style:name="P17" style:parent-style-name="TableContents" style:family="paragraph">
      <style:paragraph-properties fo:text-align="center"/>
    </style:style>
    <style:style style:name="TableCell18" style:family="table-cell">
      <style:table-cell-properties fo:border="0.0069in solid #000000" style:writing-mode="lr-tb" fo:padding-top="0.0381in" fo:padding-left="0.0381in" fo:padding-bottom="0.0381in" fo:padding-right="0.0381in"/>
    </style:style>
    <style:style style:name="P19" style:parent-style-name="TableContents" style:family="paragraph">
      <style:paragraph-properties fo:text-align="center"/>
    </style:style>
    <style:style style:name="TableCell20" style:family="table-cell">
      <style:table-cell-properties fo:border-top="0.0069in solid #000000" fo:border-left="none" fo:border-bottom="0.0069in solid #000000" fo:border-right="0.0069in solid #000000" style:writing-mode="lr-tb" fo:padding-top="0.0381in" fo:padding-left="0.0381in" fo:padding-bottom="0.0381in" fo:padding-right="0.0381in"/>
    </style:style>
    <style:style style:name="TableCell21" style:family="table-cell">
      <style:table-cell-properties fo:border="none" style:writing-mode="lr-tb" fo:padding-top="0.0381in" fo:padding-left="0.0381in" fo:padding-bottom="0.0381in" fo:padding-right="0.0381in"/>
    </style:style>
    <style:style style:name="TableCell22" style:family="table-cell">
      <style:table-cell-properties fo:border="none"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25"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26"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27"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32"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3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34" style:family="table-cell">
      <style:table-cell-properties fo:border="none" style:writing-mode="lr-tb" fo:padding-top="0.0381in" fo:padding-left="0.0381in" fo:padding-bottom="0.0381in" fo:padding-right="0.0381in"/>
    </style:style>
    <style:style style:name="TableCell35" style:family="table-cell">
      <style:table-cell-properties fo:border="none" style:writing-mode="lr-tb" fo:padding-top="0.0381in" fo:padding-left="0.0381in" fo:padding-bottom="0.0381in" fo:padding-right="0.0381in"/>
    </style:style>
    <style:style style:name="TableCell36" style:family="table-cell">
      <style:table-cell-properties fo:border="none"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3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40"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41" style:family="table-cell">
      <style:table-cell-properties fo:border="none" style:writing-mode="lr-tb" fo:padding-top="0.0381in" fo:padding-left="0.0381in" fo:padding-bottom="0.0381in" fo:padding-right="0.0381in"/>
    </style:style>
    <style:style style:name="TableCell42" style:family="table-cell">
      <style:table-cell-properties fo:border="none" style:writing-mode="lr-tb" fo:padding-top="0.0381in" fo:padding-left="0.0381in" fo:padding-bottom="0.0381in" fo:padding-right="0.0381in"/>
    </style:style>
    <style:style style:name="TableCell43" style:family="table-cell">
      <style:table-cell-properties fo:border="none"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46" style:family="table-cell">
      <style:table-cell-properties fo:border="none" style:writing-mode="lr-tb" fo:padding-top="0.0381in" fo:padding-left="0.0381in" fo:padding-bottom="0.0381in" fo:padding-right="0.0381in"/>
    </style:style>
    <style:style style:name="TableCell47" style:family="table-cell">
      <style:table-cell-properties fo:border="none"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50" style:family="table-cell">
      <style:table-cell-properties fo:border="none" style:writing-mode="lr-tb" fo:padding-top="0.0381in" fo:padding-left="0.0381in" fo:padding-bottom="0.0381in" fo:padding-right="0.0381in"/>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text-properties fo:font-size="10pt" style:font-size-asian="10pt" style:font-size-complex="10pt"/>
    </style:style>
    <style:style style:name="T53" style:parent-style-name="DefaultParagraphFont" style:family="text">
      <style:text-properties style:text-underline-type="single" style:text-underline-style="solid" style:text-underline-width="auto" style:text-underline-mode="continuous"/>
    </style:style>
    <style:style style:name="T54" style:parent-style-name="DefaultParagraphFont" style:family="text">
      <style:text-properties style:text-underline-type="single" style:text-underline-style="solid" style:text-underline-width="auto" style:text-underline-mode="continuous"/>
    </style:style>
    <style:style style:name="TableColumn56" style:family="table-column">
      <style:table-column-properties style:column-width="0.575in" style:use-optimal-column-width="false"/>
    </style:style>
    <style:style style:name="TableColumn57" style:family="table-column">
      <style:table-column-properties style:column-width="0.652in" style:use-optimal-column-width="false"/>
    </style:style>
    <style:style style:name="TableColumn58" style:family="table-column">
      <style:table-column-properties style:column-width="1.0756in" style:use-optimal-column-width="false"/>
    </style:style>
    <style:style style:name="TableColumn59" style:family="table-column">
      <style:table-column-properties style:column-width="1.1125in" style:use-optimal-column-width="false"/>
    </style:style>
    <style:style style:name="TableColumn60" style:family="table-column">
      <style:table-column-properties style:column-width="1.1916in" style:use-optimal-column-width="false"/>
    </style:style>
    <style:style style:name="TableColumn61" style:family="table-column">
      <style:table-column-properties style:column-width="1.1506in" style:use-optimal-column-width="false"/>
    </style:style>
    <style:style style:name="TableColumn62" style:family="table-column">
      <style:table-column-properties style:column-width="0.577in" style:use-optimal-column-width="false"/>
    </style:style>
    <style:style style:name="TableColumn63" style:family="table-column">
      <style:table-column-properties style:column-width="0.5902in" style:use-optimal-column-width="false"/>
    </style:style>
    <style:style style:name="Table55" style:family="table">
      <style:table-properties style:width="6.925in" fo:margin-left="0in" table:align="left"/>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6" style:parent-style-name="TableContents" style:family="paragraph">
      <style:paragraph-properties fo:text-align="center"/>
    </style:style>
    <style:style style:name="TableCell67" style:family="table-cell">
      <style:table-cell-properties fo:border="0.0069in solid #000000"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69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0.0069in solid #000000" fo:border-left="none" fo:border-bottom="0.0069in solid #000000" fo:border-right="0.0069in solid #000000" style:writing-mode="lr-tb" fo:padding-top="0.0381in" fo:padding-left="0.0381in" fo:padding-bottom="0.0381in" fo:padding-right="0.0381in"/>
    </style:style>
    <style:style style:name="TableCell72" style:family="table-cell">
      <style:table-cell-properties fo:border="none" style:writing-mode="lr-tb" fo:padding-top="0.0381in" fo:padding-left="0.0381in" fo:padding-bottom="0.0381in" fo:padding-right="0.0381in"/>
    </style:style>
    <style:style style:name="TableCell73" style:family="table-cell">
      <style:table-cell-properties fo:border="none"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76"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77" style:family="table-cell">
      <style:table-cell-properties fo:border="none" style:writing-mode="lr-tb" fo:padding-top="0.0381in" fo:padding-left="0.0381in" fo:padding-bottom="0.0381in" fo:padding-right="0.0381in"/>
    </style:style>
    <style:style style:name="TableCell78" style:family="table-cell">
      <style:table-cell-properties fo:border="none"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81" style:family="table-cell">
      <style:table-cell-properties fo:border="none" style:writing-mode="lr-tb" fo:padding-top="0.0381in" fo:padding-left="0.0381in" fo:padding-bottom="0.0381in" fo:padding-right="0.0381in"/>
    </style:style>
    <style:style style:name="TableCell82" style:family="table-cell">
      <style:table-cell-properties fo:border="none" style:writing-mode="lr-tb" fo:padding-top="0.0381in" fo:padding-left="0.0381in" fo:padding-bottom="0.0381in" fo:padding-right="0.0381in"/>
    </style:style>
    <style:style style:name="TableCell83" style:family="table-cell">
      <style:table-cell-properties fo:border="none"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86" style:family="table-cell">
      <style:table-cell-properties fo:border="none" style:writing-mode="lr-tb" fo:padding-top="0.0381in" fo:padding-left="0.0381in" fo:padding-bottom="0.0381in" fo:padding-right="0.0381in"/>
    </style:style>
    <style:style style:name="TableCell87" style:family="table-cell">
      <style:table-cell-properties fo:border="none"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90"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9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92" style:family="table-cell">
      <style:table-cell-properties fo:border="none" style:writing-mode="lr-tb" fo:padding-top="0.0381in" fo:padding-left="0.0381in" fo:padding-bottom="0.0381in" fo:padding-right="0.0381in"/>
    </style:style>
    <style:style style:name="TableCell93" style:family="table-cell">
      <style:table-cell-properties fo:border="none"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Cell96" style:family="table-cell">
      <style:table-cell-properties fo:border-top="none" fo:border-left="none" fo:border-bottom="none" fo:border-right="0.0069in solid #000000" style:writing-mode="lr-tb" fo:padding-top="0.0381in" fo:padding-left="0.0381in" fo:padding-bottom="0.0381in" fo:padding-right="0.0381in"/>
    </style:style>
    <style:style style:name="TableCell97" style:family="table-cell">
      <style:table-cell-properties fo:border="none" style:writing-mode="lr-tb" fo:padding-top="0.0381in" fo:padding-left="0.0381in" fo:padding-bottom="0.0381in" fo:padding-right="0.0381in"/>
    </style:style>
    <style:style style:name="TableCell98" style:family="table-cell">
      <style:table-cell-properties fo:border="none" style:writing-mode="lr-tb" fo:padding-top="0.0381in" fo:padding-left="0.0381in" fo:padding-bottom="0.0381in" fo:padding-right="0.0381in"/>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fo:color="#00B050"/>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PreformattedText" style:family="paragraph">
      <style:text-properties fo:font-weight="bold" style:font-weight-asian="bold" style:font-weight-complex="bold"/>
    </style:style>
    <style:style style:name="P106" style:parent-style-name="PreformattedText" style:family="paragraph">
      <style:text-properties fo:font-weight="bold" style:font-weight-asian="bold" style:font-weight-complex="bold"/>
    </style:style>
    <style:style style:family="graphic" style:name="a6">
      <style:graphic-properties style:wrap="run-through" style:run-through="foreground" draw:fill="none" draw:stroke="solid" svg:stroke-width="0.00694in" svg:stroke-color="#ff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e97132"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215f9a"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e97132"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ff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156082"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156082"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215f9a" svg:stroke-opacity="100%" draw:stroke-linejoin="miter" svg:stroke-linecap="butt" style:horizontal-rel="paragraph" style:vertical-rel="paragraph" style:horizontal-pos="from-left" style:vertical-pos="from-top"/>
    </style:style>
  </office:automatic-styles>
  <office:body>
    <office:text text:use-soft-page-breaks="true">
      <text:p text:style-name="P1"><draw:custom-shape svg:x="-0.18803in" svg:y="2.47917in" svg:width="1.65833in" svg:height="0.36667in" draw:z-index="251660288" draw:id="id0" draw:style-name="a0" draw:name="Freeform: Shape 2" text:anchor-type="paragraph"><svg:title/><svg:desc/><draw:enhanced-geometry draw:type="non-primitive" svg:viewBox="0 0 1516864 335280" draw:enhanced-path="M 229084 91440 C 216384 93980 203759 96931 190984 99060 173268 102013 155068 102324 137644 106680 61999 125591 130370 114152 76684 137160 67058 141285 56010 141103 46204 144780 35568 148768 25884 154940 15724 160020 10644 170180 484 179141 484 190500 484 240808 9132 239445 38584 259080 416786 247261 381497 244819 899644 259080 970918 261042 1041884 269240 1113004 274320 1135864 281940 1159022 288719 1181584 297180 1337254 355556 1143855 289684 1280644 335280 1287553 334416 1363837 326387 1379704 320040 1489558 276098 1359048 311869 1448284 289560 1470174 276426 1494429 266062 1509244 243840 1513699 237157 1514324 228600 1516864 220980 1514324 208280 1513792 195007 1509244 182880 1506028 174305 1498858 167786 1494004 160020 1486154 147461 1477768 135167 1471144 121920 1467552 114736 1469204 104740 1463524 99060 1457844 93380 1448284 93980 1440664 91440 1430504 83820 1421286 74748 1410184 68580 1378583 51024 1355195 49557 1318744 45720 1288326 42518 1257837 39896 1227304 38100 1171463 34815 1115586 31811 1059664 30480 L 587224 22860 442444 7620 C 432093 6028 422124 2540 411964 0 356084 2540 299965 1864 244324 7620 215583 10593 180228 27846 152884 38100 145363 40920 137045 41819 130024 45720 114013 54615 99544 66040 84304 76200 76684 81280 70329 89219 61444 91440 L 30964 99060 C 4811 138289 -19460 141676 23344 160020 67923 179125 42778 156594 61444 175260 N" draw:text-areas="?f128 ?f130 ?f129 ?f131" draw:glue-points="?f68 ?f69 ?f70 ?f71 ?f72 ?f73 ?f74 ?f75 ?f76 ?f77 ?f78 ?f79 ?f80 ?f81 ?f82 ?f83 ?f84 ?f83 ?f85 ?f86 ?f87 ?f88 ?f89 ?f90 ?f91 ?f92 ?f93 ?f94 ?f95 ?f96 ?f97 ?f98 ?f95 ?f99 ?f100 ?f79 ?f101 ?f102 ?f103 ?f71 ?f104 ?f69 ?f105 ?f106 ?f107 ?f108 ?f109 ?f110 ?f111 ?f112 ?f113 ?f114 ?f115 ?f116 ?f117 ?f118 ?f119 ?f116 ?f120 ?f110 ?f121 ?f108 ?f122 ?f123 ?f124 ?f69 ?f125 ?f71 ?f126 ?f79 ?f124 ?f127"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6864"/><draw:equation draw:name="f7" draw:formula="?f4 / 335280"/><draw:equation draw:name="f8" draw:formula="229084 * ?f5 / 1516864"/><draw:equation draw:name="f9" draw:formula="91440 * ?f4 / 335280"/><draw:equation draw:name="f10" draw:formula="190984 * ?f5 / 1516864"/><draw:equation draw:name="f11" draw:formula="99060 * ?f4 / 335280"/><draw:equation draw:name="f12" draw:formula="137644 * ?f5 / 1516864"/><draw:equation draw:name="f13" draw:formula="106680 * ?f4 / 335280"/><draw:equation draw:name="f14" draw:formula="76684 * ?f5 / 1516864"/><draw:equation draw:name="f15" draw:formula="137160 * ?f4 / 335280"/><draw:equation draw:name="f16" draw:formula="46204 * ?f5 / 1516864"/><draw:equation draw:name="f17" draw:formula="144780 * ?f4 / 335280"/><draw:equation draw:name="f18" draw:formula="15724 * ?f5 / 1516864"/><draw:equation draw:name="f19" draw:formula="160020 * ?f4 / 335280"/><draw:equation draw:name="f20" draw:formula="484 * ?f5 / 1516864"/><draw:equation draw:name="f21" draw:formula="190500 * ?f4 / 335280"/><draw:equation draw:name="f22" draw:formula="38584 * ?f5 / 1516864"/><draw:equation draw:name="f23" draw:formula="259080 * ?f4 / 335280"/><draw:equation draw:name="f24" draw:formula="899644 * ?f5 / 1516864"/><draw:equation draw:name="f25" draw:formula="1113004 * ?f5 / 1516864"/><draw:equation draw:name="f26" draw:formula="274320 * ?f4 / 335280"/><draw:equation draw:name="f27" draw:formula="1181584 * ?f5 / 1516864"/><draw:equation draw:name="f28" draw:formula="297180 * ?f4 / 335280"/><draw:equation draw:name="f29" draw:formula="1280644 * ?f5 / 1516864"/><draw:equation draw:name="f30" draw:formula="335280 * ?f4 / 335280"/><draw:equation draw:name="f31" draw:formula="1379704 * ?f5 / 1516864"/><draw:equation draw:name="f32" draw:formula="320040 * ?f4 / 335280"/><draw:equation draw:name="f33" draw:formula="1448284 * ?f5 / 1516864"/><draw:equation draw:name="f34" draw:formula="289560 * ?f4 / 335280"/><draw:equation draw:name="f35" draw:formula="1509244 * ?f5 / 1516864"/><draw:equation draw:name="f36" draw:formula="243840 * ?f4 / 335280"/><draw:equation draw:name="f37" draw:formula="1516864 * ?f5 / 1516864"/><draw:equation draw:name="f38" draw:formula="220980 * ?f4 / 335280"/><draw:equation draw:name="f39" draw:formula="182880 * ?f4 / 335280"/><draw:equation draw:name="f40" draw:formula="1494004 * ?f5 / 1516864"/><draw:equation draw:name="f41" draw:formula="1471144 * ?f5 / 1516864"/><draw:equation draw:name="f42" draw:formula="121920 * ?f4 / 335280"/><draw:equation draw:name="f43" draw:formula="1463524 * ?f5 / 1516864"/><draw:equation draw:name="f44" draw:formula="1440664 * ?f5 / 1516864"/><draw:equation draw:name="f45" draw:formula="1410184 * ?f5 / 1516864"/><draw:equation draw:name="f46" draw:formula="68580 * ?f4 / 335280"/><draw:equation draw:name="f47" draw:formula="1318744 * ?f5 / 1516864"/><draw:equation draw:name="f48" draw:formula="45720 * ?f4 / 335280"/><draw:equation draw:name="f49" draw:formula="1227304 * ?f5 / 1516864"/><draw:equation draw:name="f50" draw:formula="38100 * ?f4 / 335280"/><draw:equation draw:name="f51" draw:formula="1059664 * ?f5 / 1516864"/><draw:equation draw:name="f52" draw:formula="30480 * ?f4 / 335280"/><draw:equation draw:name="f53" draw:formula="587224 * ?f5 / 1516864"/><draw:equation draw:name="f54" draw:formula="22860 * ?f4 / 335280"/><draw:equation draw:name="f55" draw:formula="442444 * ?f5 / 1516864"/><draw:equation draw:name="f56" draw:formula="7620 * ?f4 / 335280"/><draw:equation draw:name="f57" draw:formula="411964 * ?f5 / 1516864"/><draw:equation draw:name="f58" draw:formula="0 * ?f4 / 335280"/><draw:equation draw:name="f59" draw:formula="244324 * ?f5 / 1516864"/><draw:equation draw:name="f60" draw:formula="152884 * ?f5 / 1516864"/><draw:equation draw:name="f61" draw:formula="130024 * ?f5 / 1516864"/><draw:equation draw:name="f62" draw:formula="84304 * ?f5 / 1516864"/><draw:equation draw:name="f63" draw:formula="76200 * ?f4 / 335280"/><draw:equation draw:name="f64" draw:formula="61444 * ?f5 / 1516864"/><draw:equation draw:name="f65" draw:formula="30964 * ?f5 / 1516864"/><draw:equation draw:name="f66" draw:formula="23344 * ?f5 / 1516864"/><draw:equation draw:name="f67" draw:formula="175260 * ?f4 / 335280"/><draw:equation draw:name="f68" draw:formula="?f8 / ?f6"/><draw:equation draw:name="f69" draw:formula="?f9 / ?f7"/><draw:equation draw:name="f70" draw:formula="?f10 / ?f6"/><draw:equation draw:name="f71" draw:formula="?f11 / ?f7"/><draw:equation draw:name="f72" draw:formula="?f12 / ?f6"/><draw:equation draw:name="f73" draw:formula="?f13 / ?f7"/><draw:equation draw:name="f74" draw:formula="?f14 / ?f6"/><draw:equation draw:name="f75" draw:formula="?f15 / ?f7"/><draw:equation draw:name="f76" draw:formula="?f16 / ?f6"/><draw:equation draw:name="f77" draw:formula="?f17 / ?f7"/><draw:equation draw:name="f78" draw:formula="?f18 / ?f6"/><draw:equation draw:name="f79" draw:formula="?f19 / ?f7"/><draw:equation draw:name="f80" draw:formula="?f20 / ?f6"/><draw:equation draw:name="f81" draw:formula="?f21 / ?f7"/><draw:equation draw:name="f82" draw:formula="?f22 / ?f6"/><draw:equation draw:name="f83" draw:formula="?f23 / ?f7"/><draw:equation draw:name="f84" draw:formula="?f24 / ?f6"/><draw:equation draw:name="f85" draw:formula="?f25 / ?f6"/><draw:equation draw:name="f86" draw:formula="?f26 / ?f7"/><draw:equation draw:name="f87" draw:formula="?f27 / ?f6"/><draw:equation draw:name="f88" draw:formula="?f28 / ?f7"/><draw:equation draw:name="f89" draw:formula="?f29 / ?f6"/><draw:equation draw:name="f90" draw:formula="?f30 / ?f7"/><draw:equation draw:name="f91" draw:formula="?f31 / ?f6"/><draw:equation draw:name="f92" draw:formula="?f32 / ?f7"/><draw:equation draw:name="f93" draw:formula="?f33 / ?f6"/><draw:equation draw:name="f94" draw:formula="?f34 / ?f7"/><draw:equation draw:name="f95" draw:formula="?f35 / ?f6"/><draw:equation draw:name="f96" draw:formula="?f36 / ?f7"/><draw:equation draw:name="f97" draw:formula="?f37 / ?f6"/><draw:equation draw:name="f98" draw:formula="?f38 / ?f7"/><draw:equation draw:name="f99" draw:formula="?f39 / ?f7"/><draw:equation draw:name="f100" draw:formula="?f40 / ?f6"/><draw:equation draw:name="f101" draw:formula="?f41 / ?f6"/><draw:equation draw:name="f102" draw:formula="?f42 / ?f7"/><draw:equation draw:name="f103" draw:formula="?f43 / ?f6"/><draw:equation draw:name="f104" draw:formula="?f44 / ?f6"/><draw:equation draw:name="f105" draw:formula="?f45 / ?f6"/><draw:equation draw:name="f106" draw:formula="?f46 / ?f7"/><draw:equation draw:name="f107" draw:formula="?f47 / ?f6"/><draw:equation draw:name="f108" draw:formula="?f48 / ?f7"/><draw:equation draw:name="f109" draw:formula="?f49 / ?f6"/><draw:equation draw:name="f110" draw:formula="?f50 / ?f7"/><draw:equation draw:name="f111" draw:formula="?f51 / ?f6"/><draw:equation draw:name="f112" draw:formula="?f52 / ?f7"/><draw:equation draw:name="f113" draw:formula="?f53 / ?f6"/><draw:equation draw:name="f114" draw:formula="?f54 / ?f7"/><draw:equation draw:name="f115" draw:formula="?f55 / ?f6"/><draw:equation draw:name="f116" draw:formula="?f56 / ?f7"/><draw:equation draw:name="f117" draw:formula="?f57 / ?f6"/><draw:equation draw:name="f118" draw:formula="?f58 / ?f7"/><draw:equation draw:name="f119" draw:formula="?f59 / ?f6"/><draw:equation draw:name="f120" draw:formula="?f60 / ?f6"/><draw:equation draw:name="f121" draw:formula="?f61 / ?f6"/><draw:equation draw:name="f122" draw:formula="?f62 / ?f6"/><draw:equation draw:name="f123" draw:formula="?f63 / ?f7"/><draw:equation draw:name="f124" draw:formula="?f64 / ?f6"/><draw:equation draw:name="f125" draw:formula="?f65 / ?f6"/><draw:equation draw:name="f126" draw:formula="?f66 / ?f6"/><draw:equation draw:name="f127" draw:formula="?f67 / ?f7"/><draw:equation draw:name="f128" draw:formula="?f0 / ?f6"/><draw:equation draw:name="f129" draw:formula="?f1 / ?f6"/><draw:equation draw:name="f130" draw:formula="?f2 / ?f7"/><draw:equation draw:name="f131" draw:formula="?f3 / ?f7"/></draw:enhanced-geometry></draw:custom-shape><draw:custom-shape svg:x="-0.12979in" svg:y="2.21164in" svg:width="1.325in" svg:height="0.27569in" draw:z-index="251659264" draw:id="id1" draw:style-name="a1" draw:name="Freeform: Shape 1" text:anchor-type="paragraph"><svg:title/><svg:desc/><draw:enhanced-geometry draw:type="non-primitive" svg:viewBox="0 0 1212149 252244" draw:enhanced-path="M 213929 38884 C 175829 43964 137320 46586 99629 54124 83413 57367 46831 76713 31049 84604 19514 101907 2344 124260 569 145564 -923 163462 157 182840 8189 198904 19794 222115 48821 223576 69149 229384 76872 231591 84019 236177 92009 237004 157893 243820 224089 247164 290129 252244 L 625409 237004 C 676332 234276 714924 231293 762569 221764 772838 219710 782889 216684 793049 214144 841309 216684 889701 217389 937829 221764 945828 222491 952663 229693 960689 229384 1019286 227130 1077529 219224 1135949 214144 1148649 206524 1162804 200923 1174049 191284 1181002 185324 1182813 174900 1189289 168424 1195765 161948 1204529 158264 1212149 153184 1189121 133994 1158004 104094 1128329 92224 1116304 87414 1102929 87144 1090229 84604 996395 44389 1076970 73924 991169 54124 973151 49966 955994 42344 937829 38884 902542 32163 865688 33512 831149 23644 722885 -7289 775042 3073 587309 784 442540 -981 297749 784 152969 784 N" draw:text-areas="?f86 ?f88 ?f87 ?f89" draw:glue-points="?f47 ?f48 ?f49 ?f50 ?f51 ?f52 ?f53 ?f54 ?f55 ?f56 ?f57 ?f58 ?f59 ?f60 ?f61 ?f62 ?f63 ?f60 ?f64 ?f65 ?f66 ?f67 ?f68 ?f65 ?f69 ?f58 ?f70 ?f67 ?f71 ?f72 ?f73 ?f74 ?f75 ?f76 ?f77 ?f78 ?f79 ?f52 ?f80 ?f50 ?f68 ?f48 ?f81 ?f82 ?f83 ?f84 ?f85 ?f84" draw:glue-point-leaving-directions="-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149"/><draw:equation draw:name="f7" draw:formula="?f4 / 252244"/><draw:equation draw:name="f8" draw:formula="213929 * ?f5 / 1212149"/><draw:equation draw:name="f9" draw:formula="38884 * ?f4 / 252244"/><draw:equation draw:name="f10" draw:formula="99629 * ?f5 / 1212149"/><draw:equation draw:name="f11" draw:formula="54124 * ?f4 / 252244"/><draw:equation draw:name="f12" draw:formula="31049 * ?f5 / 1212149"/><draw:equation draw:name="f13" draw:formula="84604 * ?f4 / 252244"/><draw:equation draw:name="f14" draw:formula="569 * ?f5 / 1212149"/><draw:equation draw:name="f15" draw:formula="145564 * ?f4 / 252244"/><draw:equation draw:name="f16" draw:formula="8189 * ?f5 / 1212149"/><draw:equation draw:name="f17" draw:formula="198904 * ?f4 / 252244"/><draw:equation draw:name="f18" draw:formula="69149 * ?f5 / 1212149"/><draw:equation draw:name="f19" draw:formula="229384 * ?f4 / 252244"/><draw:equation draw:name="f20" draw:formula="92009 * ?f5 / 1212149"/><draw:equation draw:name="f21" draw:formula="237004 * ?f4 / 252244"/><draw:equation draw:name="f22" draw:formula="290129 * ?f5 / 1212149"/><draw:equation draw:name="f23" draw:formula="252244 * ?f4 / 252244"/><draw:equation draw:name="f24" draw:formula="625409 * ?f5 / 1212149"/><draw:equation draw:name="f25" draw:formula="762569 * ?f5 / 1212149"/><draw:equation draw:name="f26" draw:formula="221764 * ?f4 / 252244"/><draw:equation draw:name="f27" draw:formula="793049 * ?f5 / 1212149"/><draw:equation draw:name="f28" draw:formula="214144 * ?f4 / 252244"/><draw:equation draw:name="f29" draw:formula="937829 * ?f5 / 1212149"/><draw:equation draw:name="f30" draw:formula="960689 * ?f5 / 1212149"/><draw:equation draw:name="f31" draw:formula="1135949 * ?f5 / 1212149"/><draw:equation draw:name="f32" draw:formula="1174049 * ?f5 / 1212149"/><draw:equation draw:name="f33" draw:formula="191284 * ?f4 / 252244"/><draw:equation draw:name="f34" draw:formula="1189289 * ?f5 / 1212149"/><draw:equation draw:name="f35" draw:formula="168424 * ?f4 / 252244"/><draw:equation draw:name="f36" draw:formula="1212149 * ?f5 / 1212149"/><draw:equation draw:name="f37" draw:formula="153184 * ?f4 / 252244"/><draw:equation draw:name="f38" draw:formula="1128329 * ?f5 / 1212149"/><draw:equation draw:name="f39" draw:formula="92224 * ?f4 / 252244"/><draw:equation draw:name="f40" draw:formula="1090229 * ?f5 / 1212149"/><draw:equation draw:name="f41" draw:formula="991169 * ?f5 / 1212149"/><draw:equation draw:name="f42" draw:formula="831149 * ?f5 / 1212149"/><draw:equation draw:name="f43" draw:formula="23644 * ?f4 / 252244"/><draw:equation draw:name="f44" draw:formula="587309 * ?f5 / 1212149"/><draw:equation draw:name="f45" draw:formula="784 * ?f4 / 252244"/><draw:equation draw:name="f46" draw:formula="152969 * ?f5 / 1212149"/><draw:equation draw:name="f47" draw:formula="?f8 / ?f6"/><draw:equation draw:name="f48" draw:formula="?f9 / ?f7"/><draw:equation draw:name="f49" draw:formula="?f10 / ?f6"/><draw:equation draw:name="f50" draw:formula="?f11 / ?f7"/><draw:equation draw:name="f51" draw:formula="?f12 / ?f6"/><draw:equation draw:name="f52" draw:formula="?f13 / ?f7"/><draw:equation draw:name="f53" draw:formula="?f14 / ?f6"/><draw:equation draw:name="f54" draw:formula="?f15 / ?f7"/><draw:equation draw:name="f55" draw:formula="?f16 / ?f6"/><draw:equation draw:name="f56" draw:formula="?f17 / ?f7"/><draw:equation draw:name="f57" draw:formula="?f18 / ?f6"/><draw:equation draw:name="f58" draw:formula="?f19 / ?f7"/><draw:equation draw:name="f59" draw:formula="?f20 / ?f6"/><draw:equation draw:name="f60" draw:formula="?f21 / ?f7"/><draw:equation draw:name="f61" draw:formula="?f22 / ?f6"/><draw:equation draw:name="f62" draw:formula="?f23 / ?f7"/><draw:equation draw:name="f63" draw:formula="?f24 / ?f6"/><draw:equation draw:name="f64" draw:formula="?f25 / ?f6"/><draw:equation draw:name="f65" draw:formula="?f26 / ?f7"/><draw:equation draw:name="f66" draw:formula="?f27 / ?f6"/><draw:equation draw:name="f67" draw:formula="?f28 / ?f7"/><draw:equation draw:name="f68" draw:formula="?f29 / ?f6"/><draw:equation draw:name="f69" draw:formula="?f30 / ?f6"/><draw:equation draw:name="f70" draw:formula="?f31 / ?f6"/><draw:equation draw:name="f71" draw:formula="?f32 / ?f6"/><draw:equation draw:name="f72" draw:formula="?f33 / ?f7"/><draw:equation draw:name="f73" draw:formula="?f34 / ?f6"/><draw:equation draw:name="f74" draw:formula="?f35 / ?f7"/><draw:equation draw:name="f75" draw:formula="?f36 / ?f6"/><draw:equation draw:name="f76" draw:formula="?f37 / ?f7"/><draw:equation draw:name="f77" draw:formula="?f38 / ?f6"/><draw:equation draw:name="f78" draw:formula="?f39 / ?f7"/><draw:equation draw:name="f79" draw:formula="?f40 / ?f6"/><draw:equation draw:name="f80" draw:formula="?f41 / ?f6"/><draw:equation draw:name="f81" draw:formula="?f42 / ?f6"/><draw:equation draw:name="f82" draw:formula="?f43 / ?f7"/><draw:equation draw:name="f83" draw:formula="?f44 / ?f6"/><draw:equation draw:name="f84" draw:formula="?f45 / ?f7"/><draw:equation draw:name="f85" draw:formula="?f46 / ?f6"/><draw:equation draw:name="f86" draw:formula="?f0 / ?f6"/><draw:equation draw:name="f87" draw:formula="?f1 / ?f6"/><draw:equation draw:name="f88" draw:formula="?f2 / ?f7"/><draw:equation draw:name="f89" draw:formula="?f3 / ?f7"/></draw:enhanced-geometry></draw:custom-shape>I hope this exercise serves as a refresher for the client server relationship.<text:s/><text:line-break/>Consider the following and highlight the sections for the questions that follow.<text:s/><text:line-break/><text:line-break/><text:span text:style-name="T2">IP Header</text:span><text:line-break/></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2">
            <text:p text:style-name="P15"><text:s/>1 Byte</text:p>
          </table:table-cell>
          <table:covered-table-cell/>
          <table:table-cell table:style-name="TableCell16">
            <text:p text:style-name="P17"/>
          </table:table-cell>
          <table:table-cell table:style-name="TableCell18" table:number-columns-spanned="2">
            <text:p text:style-name="P19"/>
          </table:table-cell>
          <table:covered-table-cell/>
          <table:table-cell table:style-name="TableCell20">
            <text:p text:style-name="TableContents"/>
          </table:table-cell>
          <table:table-cell table:style-name="TableCell21">
            <text:p text:style-name="TableContents"/>
          </table:table-cell>
          <table:table-cell table:style-name="TableCell22" table:number-columns-spanned="2">
            <text:p text:style-name="TableContents"/>
          </table:table-cell>
          <table:covered-table-cell/>
        </table:table-row>
        <table:table-row table:style-name="TableRow23">
          <table:table-cell table:style-name="TableCell24">
            <text:p text:style-name="TableContents">Version</text:p>
          </table:table-cell>
          <table:table-cell table:style-name="TableCell25">
            <text:p text:style-name="TableContents">Header</text:p>
            <text:p text:style-name="TableContents">Length</text:p>
          </table:table-cell>
          <table:table-cell table:style-name="TableCell26">
            <text:p text:style-name="TableContents">Type of Service</text:p>
          </table:table-cell>
          <table:table-cell table:style-name="TableCell27" table:number-columns-spanned="3">
            <text:p text:style-name="TableContents">Total Length</text:p>
          </table:table-cell>
          <table:covered-table-cell/>
          <table:covered-table-cell/>
          <table:table-cell table:style-name="TableCell28">
            <text:p text:style-name="TableContents"/>
          </table:table-cell>
          <table:table-cell table:style-name="TableCell29" table:number-columns-spanned="2">
            <text:p text:style-name="TableContents"/>
          </table:table-cell>
          <table:covered-table-cell/>
        </table:table-row>
        <table:table-row table:style-name="TableRow30">
          <table:table-cell table:style-name="TableCell31" table:number-columns-spanned="3">
            <text:p text:style-name="TableContents"><text:s/>Identification</text:p>
          </table:table-cell>
          <table:covered-table-cell/>
          <table:covered-table-cell/>
          <table:table-cell table:style-name="TableCell32">
            <text:p text:style-name="TableContents"><text:s/>Flags</text:p>
          </table:table-cell>
          <table:table-cell table:style-name="TableCell33" table:number-columns-spanned="2">
            <text:p text:style-name="TableContents">Fragment Offset</text:p>
          </table:table-cell>
          <table:covered-table-cell/>
          <table:table-cell table:style-name="TableCell34">
            <text:p text:style-name="TableContents"/>
          </table:table-cell>
          <table:table-cell table:style-name="TableCell35">
            <text:p text:style-name="TableContents"/>
          </table:table-cell>
          <table:table-cell table:style-name="TableCell36">
            <text:p text:style-name="TableContents"/>
          </table:table-cell>
        </table:table-row>
        <table:table-row table:style-name="TableRow37">
          <table:table-cell table:style-name="TableCell38" table:number-columns-spanned="2">
            <text:p text:style-name="TableContents">Time To Live</text:p>
          </table:table-cell>
          <table:covered-table-cell/>
          <table:table-cell table:style-name="TableCell39">
            <text:p text:style-name="TableContents">Protocol</text:p>
          </table:table-cell>
          <table:table-cell table:style-name="TableCell40" table:number-columns-spanned="3">
            <text:p text:style-name="TableContents">Header Checksum</text:p>
          </table:table-cell>
          <table:covered-table-cell/>
          <table:covered-table-cell/>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able:number-columns-spanned="6">
            <text:p text:style-name="TableContents">Source Address</text:p>
          </table:table-cell>
          <table:covered-table-cell/>
          <table:covered-table-cell/>
          <table:covered-table-cell/>
          <table:covered-table-cell/>
          <table:covered-table-cell/>
          <table:table-cell table:style-name="TableCell46">
            <text:p text:style-name="TableContents"/>
          </table:table-cell>
          <table:table-cell table:style-name="TableCell47" table:number-columns-spanned="2">
            <text:p text:style-name="TableContents"/>
          </table:table-cell>
          <table:covered-table-cell/>
        </table:table-row>
        <table:table-row table:style-name="TableRow48">
          <table:table-cell table:style-name="TableCell49" table:number-columns-spanned="6">
            <text:p text:style-name="TableContents">Destination Address</text:p>
          </table:table-cell>
          <table:covered-table-cell/>
          <table:covered-table-cell/>
          <table:covered-table-cell/>
          <table:covered-table-cell/>
          <table:covered-table-cell/>
          <table:table-cell table:style-name="TableCell50">
            <text:p text:style-name="TableContents"/>
          </table:table-cell>
          <table:table-cell table:style-name="TableCell51" table:number-columns-spanned="2">
            <text:p text:style-name="TableContents"/>
          </table:table-cell>
          <table:covered-table-cell/>
        </table:table-row>
      </table:table>
      <text:p text:style-name="P52"/>
      <text:p text:style-name="PreformattedText"><text:span text:style-name="T53"><draw:custom-shape svg:x="-0.12917in" svg:y="0.57083in" svg:width="1.03333in" svg:height="0.33403in" draw:z-index="251661312" draw:id="id2" draw:style-name="a2" draw:name="Freeform: Shape 3" text:anchor-type="paragraph"><svg:title/><svg:desc/><draw:enhanced-geometry draw:type="non-primitive" svg:viewBox="0 0 944880 305937" draw:enhanced-path="M 281940 60960 C 203200 66040 124318 69265 45720 76200 37719 76906 29030 78678 22860 83820 13104 91950 7620 104140 0 114300 5080 147320 2520 182468 15240 213360 21432 228399 40329 234082 53340 243840 60666 249335 67593 255950 76200 259080 137462 281357 202286 280222 266700 281940 L 708660 289560 C 806664 314061 748721 306193 883920 297180 937260 261620 919480 281940 944880 243840 934720 200660 926586 156952 914400 114300 911279 103378 906640 92369 899160 83820 888450 71580 875607 60613 861060 53340 849476 47548 835603 48530 822960 45720 812737 43448 802511 41109 792480 38100 777093 33484 762345 26756 746760 22860 707721 13100 632102 9341 601980 7620 546133 4429 490220 2540 434340 0 383540 5080 332400 7477 281940 15240 266062 17683 251460 25400 236220 30480 228600 33020 220818 35117 213360 38100 170543 55227 188938 53340 160020 53340 N" draw:text-areas="?f88 ?f90 ?f89 ?f91" draw:glue-points="?f48 ?f49 ?f50 ?f51 ?f52 ?f53 ?f54 ?f55 ?f56 ?f57 ?f58 ?f59 ?f60 ?f61 ?f62 ?f63 ?f64 ?f65 ?f66 ?f67 ?f68 ?f59 ?f69 ?f55 ?f70 ?f53 ?f71 ?f72 ?f73 ?f74 ?f75 ?f76 ?f77 ?f78 ?f79 ?f80 ?f81 ?f82 ?f48 ?f83 ?f84 ?f85 ?f86 ?f76 ?f87 ?f72"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880"/><draw:equation draw:name="f7" draw:formula="?f4 / 305937"/><draw:equation draw:name="f8" draw:formula="281940 * ?f5 / 944880"/><draw:equation draw:name="f9" draw:formula="60960 * ?f4 / 305937"/><draw:equation draw:name="f10" draw:formula="45720 * ?f5 / 944880"/><draw:equation draw:name="f11" draw:formula="76200 * ?f4 / 305937"/><draw:equation draw:name="f12" draw:formula="22860 * ?f5 / 944880"/><draw:equation draw:name="f13" draw:formula="83820 * ?f4 / 305937"/><draw:equation draw:name="f14" draw:formula="0 * ?f5 / 944880"/><draw:equation draw:name="f15" draw:formula="114300 * ?f4 / 305937"/><draw:equation draw:name="f16" draw:formula="15240 * ?f5 / 944880"/><draw:equation draw:name="f17" draw:formula="213360 * ?f4 / 305937"/><draw:equation draw:name="f18" draw:formula="53340 * ?f5 / 944880"/><draw:equation draw:name="f19" draw:formula="243840 * ?f4 / 305937"/><draw:equation draw:name="f20" draw:formula="76200 * ?f5 / 944880"/><draw:equation draw:name="f21" draw:formula="259080 * ?f4 / 305937"/><draw:equation draw:name="f22" draw:formula="266700 * ?f5 / 944880"/><draw:equation draw:name="f23" draw:formula="281940 * ?f4 / 305937"/><draw:equation draw:name="f24" draw:formula="708660 * ?f5 / 944880"/><draw:equation draw:name="f25" draw:formula="289560 * ?f4 / 305937"/><draw:equation draw:name="f26" draw:formula="883920 * ?f5 / 944880"/><draw:equation draw:name="f27" draw:formula="297180 * ?f4 / 305937"/><draw:equation draw:name="f28" draw:formula="944880 * ?f5 / 944880"/><draw:equation draw:name="f29" draw:formula="914400 * ?f5 / 944880"/><draw:equation draw:name="f30" draw:formula="899160 * ?f5 / 944880"/><draw:equation draw:name="f31" draw:formula="861060 * ?f5 / 944880"/><draw:equation draw:name="f32" draw:formula="53340 * ?f4 / 305937"/><draw:equation draw:name="f33" draw:formula="822960 * ?f5 / 944880"/><draw:equation draw:name="f34" draw:formula="45720 * ?f4 / 305937"/><draw:equation draw:name="f35" draw:formula="792480 * ?f5 / 944880"/><draw:equation draw:name="f36" draw:formula="38100 * ?f4 / 305937"/><draw:equation draw:name="f37" draw:formula="746760 * ?f5 / 944880"/><draw:equation draw:name="f38" draw:formula="22860 * ?f4 / 305937"/><draw:equation draw:name="f39" draw:formula="601980 * ?f5 / 944880"/><draw:equation draw:name="f40" draw:formula="7620 * ?f4 / 305937"/><draw:equation draw:name="f41" draw:formula="434340 * ?f5 / 944880"/><draw:equation draw:name="f42" draw:formula="0 * ?f4 / 305937"/><draw:equation draw:name="f43" draw:formula="15240 * ?f4 / 305937"/><draw:equation draw:name="f44" draw:formula="236220 * ?f5 / 944880"/><draw:equation draw:name="f45" draw:formula="30480 * ?f4 / 305937"/><draw:equation draw:name="f46" draw:formula="213360 * ?f5 / 944880"/><draw:equation draw:name="f47" draw:formula="160020 * ?f5 / 944880"/><draw:equation draw:name="f48" draw:formula="?f8 / ?f6"/><draw:equation draw:name="f49" draw:formula="?f9 / ?f7"/><draw:equation draw:name="f50" draw:formula="?f10 / ?f6"/><draw:equation draw:name="f51" draw:formula="?f11 / ?f7"/><draw:equation draw:name="f52" draw:formula="?f12 / ?f6"/><draw:equation draw:name="f53" draw:formula="?f13 / ?f7"/><draw:equation draw:name="f54" draw:formula="?f14 / ?f6"/><draw:equation draw:name="f55" draw:formula="?f15 / ?f7"/><draw:equation draw:name="f56" draw:formula="?f16 / ?f6"/><draw:equation draw:name="f57" draw:formula="?f17 / ?f7"/><draw:equation draw:name="f58" draw:formula="?f18 / ?f6"/><draw:equation draw:name="f59" draw:formula="?f19 / ?f7"/><draw:equation draw:name="f60" draw:formula="?f20 / ?f6"/><draw:equation draw:name="f61" draw:formula="?f21 / ?f7"/><draw:equation draw:name="f62" draw:formula="?f22 / ?f6"/><draw:equation draw:name="f63" draw:formula="?f23 / ?f7"/><draw:equation draw:name="f64" draw:formula="?f24 / ?f6"/><draw:equation draw:name="f65" draw:formula="?f25 / ?f7"/><draw:equation draw:name="f66" draw:formula="?f26 / ?f6"/><draw:equation draw:name="f67" draw:formula="?f27 / ?f7"/><draw:equation draw:name="f68" draw:formula="?f28 / ?f6"/><draw:equation draw:name="f69" draw:formula="?f29 / ?f6"/><draw:equation draw:name="f70" draw:formula="?f30 / ?f6"/><draw:equation draw:name="f71" draw:formula="?f31 / ?f6"/><draw:equation draw:name="f72" draw:formula="?f32 / ?f7"/><draw:equation draw:name="f73" draw:formula="?f33 / ?f6"/><draw:equation draw:name="f74" draw:formula="?f34 / ?f7"/><draw:equation draw:name="f75" draw:formula="?f35 / ?f6"/><draw:equation draw:name="f76" draw:formula="?f36 / ?f7"/><draw:equation draw:name="f77" draw:formula="?f37 / ?f6"/><draw:equation draw:name="f78" draw:formula="?f38 / ?f7"/><draw:equation draw:name="f79" draw:formula="?f39 / ?f6"/><draw:equation draw:name="f80" draw:formula="?f40 / ?f7"/><draw:equation draw:name="f81" draw:formula="?f41 / ?f6"/><draw:equation draw:name="f82" draw:formula="?f42 / ?f7"/><draw:equation draw:name="f83" draw:formula="?f43 / ?f7"/><draw:equation draw:name="f84" draw:formula="?f44 / ?f6"/><draw:equation draw:name="f85" draw:formula="?f45 / ?f7"/><draw:equation draw:name="f86" draw:formula="?f46 / ?f6"/><draw:equation draw:name="f87" draw:formula="?f47 / ?f6"/><draw:equation draw:name="f88" draw:formula="?f0 / ?f6"/><draw:equation draw:name="f89" draw:formula="?f1 / ?f6"/><draw:equation draw:name="f90" draw:formula="?f2 / ?f7"/><draw:equation draw:name="f91" draw:formula="?f3 / ?f7"/></draw:enhanced-geometry></draw:custom-shape></text:span><text:span text:style-name="T54">The Encapsulated TCP header</text:span><text:line-break/></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able:number-columns-spanned="2">
            <text:p text:style-name="P66"><text:s/>1 Byte</text:p>
          </table:table-cell>
          <table:covered-table-cell/>
          <table:table-cell table:style-name="TableCell67">
            <text:p text:style-name="P68"><draw:custom-shape svg:x="0.93488in" svg:y="0.17014in" svg:width="1.29167in" svg:height="0.41667in" draw:z-index="251662336" draw:id="id3" draw:style-name="a3" draw:name="Freeform: Shape 4" text:anchor-type="paragraph"><svg:title/><svg:desc/><draw:enhanced-geometry draw:type="non-primitive" svg:viewBox="0 0 1181594 381000" draw:enhanced-path="M 160514 76200 C 147814 81280 135390 87115 122414 91440 112479 94752 100980 93783 91934 99060 69994 111858 30974 144780 30974 144780 23354 157480 13615 169129 8114 182880 -2206 208680 -3193 259326 8114 281940 14349 294411 58562 301296 69074 304800 124760 323362 159204 344590 221474 350520 297373 357748 373874 355600 450074 358140 729274 379617 581991 371311 892034 381000 942013 377876 1001019 379679 1052054 365760 1067552 361533 1082677 356010 1097774 350520 1110629 345846 1123866 341830 1135874 335280 1151954 326509 1181594 304800 1181594 304800 1176514 266700 1176641 227535 1166354 190500 1163949 181842 1117425 146785 1113014 144780 1096180 137128 1076933 136178 1059674 129540 940524 83713 1084814 124041 968234 99060 947754 94671 927683 88530 907274 83820 894654 80908 881773 79200 869174 76200 757984 49726 738242 39587 625334 22860 597582 18749 569415 18177 541514 15240 483080 9089 490909 9691 442454 0 353554 5080 264523 8232 175754 15240 167747 15872 160078 19268 152894 22860 144703 26956 137654 33020 130034 38100 127494 45720 128094 55280 122414 60960 97144 86230 99554 55221 99554 76200 N" draw:text-areas="?f100 ?f102 ?f101 ?f103" draw:glue-points="?f54 ?f55 ?f56 ?f57 ?f58 ?f59 ?f60 ?f61 ?f62 ?f63 ?f62 ?f64 ?f65 ?f66 ?f67 ?f68 ?f69 ?f70 ?f71 ?f72 ?f73 ?f74 ?f75 ?f68 ?f76 ?f77 ?f78 ?f66 ?f79 ?f80 ?f81 ?f61 ?f82 ?f83 ?f84 ?f59 ?f85 ?f86 ?f87 ?f55 ?f88 ?f89 ?f90 ?f91 ?f92 ?f93 ?f94 ?f91 ?f95 ?f89 ?f96 ?f97 ?f56 ?f98 ?f99 ?f55" draw:glue-point-leaving-directions="-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1594"/><draw:equation draw:name="f7" draw:formula="?f4 / 381000"/><draw:equation draw:name="f8" draw:formula="160514 * ?f5 / 1181594"/><draw:equation draw:name="f9" draw:formula="76200 * ?f4 / 381000"/><draw:equation draw:name="f10" draw:formula="122414 * ?f5 / 1181594"/><draw:equation draw:name="f11" draw:formula="91440 * ?f4 / 381000"/><draw:equation draw:name="f12" draw:formula="91934 * ?f5 / 1181594"/><draw:equation draw:name="f13" draw:formula="99060 * ?f4 / 381000"/><draw:equation draw:name="f14" draw:formula="30974 * ?f5 / 1181594"/><draw:equation draw:name="f15" draw:formula="144780 * ?f4 / 381000"/><draw:equation draw:name="f16" draw:formula="8114 * ?f5 / 1181594"/><draw:equation draw:name="f17" draw:formula="182880 * ?f4 / 381000"/><draw:equation draw:name="f18" draw:formula="281940 * ?f4 / 381000"/><draw:equation draw:name="f19" draw:formula="69074 * ?f5 / 1181594"/><draw:equation draw:name="f20" draw:formula="304800 * ?f4 / 381000"/><draw:equation draw:name="f21" draw:formula="221474 * ?f5 / 1181594"/><draw:equation draw:name="f22" draw:formula="350520 * ?f4 / 381000"/><draw:equation draw:name="f23" draw:formula="450074 * ?f5 / 1181594"/><draw:equation draw:name="f24" draw:formula="358140 * ?f4 / 381000"/><draw:equation draw:name="f25" draw:formula="892034 * ?f5 / 1181594"/><draw:equation draw:name="f26" draw:formula="381000 * ?f4 / 381000"/><draw:equation draw:name="f27" draw:formula="1052054 * ?f5 / 1181594"/><draw:equation draw:name="f28" draw:formula="365760 * ?f4 / 381000"/><draw:equation draw:name="f29" draw:formula="1097774 * ?f5 / 1181594"/><draw:equation draw:name="f30" draw:formula="1135874 * ?f5 / 1181594"/><draw:equation draw:name="f31" draw:formula="335280 * ?f4 / 381000"/><draw:equation draw:name="f32" draw:formula="1181594 * ?f5 / 1181594"/><draw:equation draw:name="f33" draw:formula="1166354 * ?f5 / 1181594"/><draw:equation draw:name="f34" draw:formula="190500 * ?f4 / 381000"/><draw:equation draw:name="f35" draw:formula="1113014 * ?f5 / 1181594"/><draw:equation draw:name="f36" draw:formula="1059674 * ?f5 / 1181594"/><draw:equation draw:name="f37" draw:formula="129540 * ?f4 / 381000"/><draw:equation draw:name="f38" draw:formula="968234 * ?f5 / 1181594"/><draw:equation draw:name="f39" draw:formula="907274 * ?f5 / 1181594"/><draw:equation draw:name="f40" draw:formula="83820 * ?f4 / 381000"/><draw:equation draw:name="f41" draw:formula="869174 * ?f5 / 1181594"/><draw:equation draw:name="f42" draw:formula="625334 * ?f5 / 1181594"/><draw:equation draw:name="f43" draw:formula="22860 * ?f4 / 381000"/><draw:equation draw:name="f44" draw:formula="541514 * ?f5 / 1181594"/><draw:equation draw:name="f45" draw:formula="15240 * ?f4 / 381000"/><draw:equation draw:name="f46" draw:formula="442454 * ?f5 / 1181594"/><draw:equation draw:name="f47" draw:formula="0 * ?f4 / 381000"/><draw:equation draw:name="f48" draw:formula="175754 * ?f5 / 1181594"/><draw:equation draw:name="f49" draw:formula="152894 * ?f5 / 1181594"/><draw:equation draw:name="f50" draw:formula="130034 * ?f5 / 1181594"/><draw:equation draw:name="f51" draw:formula="38100 * ?f4 / 381000"/><draw:equation draw:name="f52" draw:formula="60960 * ?f4 / 381000"/><draw:equation draw:name="f53" draw:formula="99554 * ?f5 / 1181594"/><draw:equation draw:name="f54" draw:formula="?f8 / ?f6"/><draw:equation draw:name="f55" draw:formula="?f9 / ?f7"/><draw:equation draw:name="f56" draw:formula="?f10 / ?f6"/><draw:equation draw:name="f57" draw:formula="?f11 / ?f7"/><draw:equation draw:name="f58" draw:formula="?f12 / ?f6"/><draw:equation draw:name="f59" draw:formula="?f13 / ?f7"/><draw:equation draw:name="f60" draw:formula="?f14 / ?f6"/><draw:equation draw:name="f61" draw:formula="?f15 / ?f7"/><draw:equation draw:name="f62" draw:formula="?f16 / ?f6"/><draw:equation draw:name="f63" draw:formula="?f17 / ?f7"/><draw:equation draw:name="f64" draw:formula="?f18 / ?f7"/><draw:equation draw:name="f65" draw:formula="?f19 / ?f6"/><draw:equation draw:name="f66" draw:formula="?f20 / ?f7"/><draw:equation draw:name="f67" draw:formula="?f21 / ?f6"/><draw:equation draw:name="f68" draw:formula="?f22 / ?f7"/><draw:equation draw:name="f69" draw:formula="?f23 / ?f6"/><draw:equation draw:name="f70" draw:formula="?f24 / ?f7"/><draw:equation draw:name="f71" draw:formula="?f25 / ?f6"/><draw:equation draw:name="f72" draw:formula="?f26 / ?f7"/><draw:equation draw:name="f73" draw:formula="?f27 / ?f6"/><draw:equation draw:name="f74" draw:formula="?f28 / ?f7"/><draw:equation draw:name="f75" draw:formula="?f29 / ?f6"/><draw:equation draw:name="f76" draw:formula="?f30 / ?f6"/><draw:equation draw:name="f77" draw:formula="?f31 / ?f7"/><draw:equation draw:name="f78" draw:formula="?f32 / ?f6"/><draw:equation draw:name="f79" draw:formula="?f33 / ?f6"/><draw:equation draw:name="f80" draw:formula="?f34 / ?f7"/><draw:equation draw:name="f81" draw:formula="?f35 / ?f6"/><draw:equation draw:name="f82" draw:formula="?f36 / ?f6"/><draw:equation draw:name="f83" draw:formula="?f37 / ?f7"/><draw:equation draw:name="f84" draw:formula="?f38 / ?f6"/><draw:equation draw:name="f85" draw:formula="?f39 / ?f6"/><draw:equation draw:name="f86" draw:formula="?f40 / ?f7"/><draw:equation draw:name="f87" draw:formula="?f41 / ?f6"/><draw:equation draw:name="f88" draw:formula="?f42 / ?f6"/><draw:equation draw:name="f89" draw:formula="?f43 / ?f7"/><draw:equation draw:name="f90" draw:formula="?f44 / ?f6"/><draw:equation draw:name="f91" draw:formula="?f45 / ?f7"/><draw:equation draw:name="f92" draw:formula="?f46 / ?f6"/><draw:equation draw:name="f93" draw:formula="?f47 / ?f7"/><draw:equation draw:name="f94" draw:formula="?f48 / ?f6"/><draw:equation draw:name="f95" draw:formula="?f49 / ?f6"/><draw:equation draw:name="f96" draw:formula="?f50 / ?f6"/><draw:equation draw:name="f97" draw:formula="?f51 / ?f7"/><draw:equation draw:name="f98" draw:formula="?f52 / ?f7"/><draw:equation draw:name="f99" draw:formula="?f53 / ?f6"/><draw:equation draw:name="f100" draw:formula="?f0 / ?f6"/><draw:equation draw:name="f101" draw:formula="?f1 / ?f6"/><draw:equation draw:name="f102" draw:formula="?f2 / ?f7"/><draw:equation draw:name="f103" draw:formula="?f3 / ?f7"/></draw:enhanced-geometry></draw:custom-shape></text:p>
          </table:table-cell>
          <table:table-cell table:style-name="TableCell69">
            <text:p text:style-name="P70"/>
          </table:table-cell>
          <table:table-cell table:style-name="TableCell71">
            <text:p text:style-name="TableContents"/>
          </table:table-cell>
          <table:table-cell table:style-name="TableCell72">
            <text:p text:style-name="TableContents"/>
          </table:table-cell>
          <table:table-cell table:style-name="TableCell73" table:number-columns-spanned="2">
            <text:p text:style-name="TableContents"/>
          </table:table-cell>
          <table:covered-table-cell/>
        </table:table-row>
        <table:table-row table:style-name="TableRow74">
          <table:table-cell table:style-name="TableCell75" table:number-columns-spanned="3">
            <text:p text:style-name="TableContents">Source Port</text:p>
          </table:table-cell>
          <table:covered-table-cell/>
          <table:covered-table-cell/>
          <table:table-cell table:style-name="TableCell76" table:number-columns-spanned="2">
            <text:p text:style-name="TableContents">Destination Port</text:p>
          </table:table-cell>
          <table:covered-table-cell/>
          <table:table-cell table:style-name="TableCell77">
            <text:p text:style-name="TableContents"/>
          </table:table-cell>
          <table:table-cell table:style-name="TableCell78" table:number-columns-spanned="2">
            <text:p text:style-name="TableContents"/>
          </table:table-cell>
          <table:covered-table-cell/>
        </table:table-row>
        <table:table-row table:style-name="TableRow79">
          <table:table-cell table:style-name="TableCell80" table:number-columns-spanned="5">
            <text:p text:style-name="TableContents"><text:s/>Sequence Number</text:p>
          </table:table-cell>
          <table:covered-table-cell/>
          <table:covered-table-cell/>
          <table:covered-table-cell/>
          <table:covered-table-cell/>
          <table:table-cell table:style-name="TableCell81">
            <text:p text:style-name="TableContents"/>
          </table:table-cell>
          <table:table-cell table:style-name="TableCell82">
            <text:p text:style-name="TableContents"/>
          </table:table-cell>
          <table:table-cell table:style-name="TableCell83">
            <text:p text:style-name="TableContents"/>
          </table:table-cell>
        </table:table-row>
        <table:table-row table:style-name="TableRow84">
          <table:table-cell table:style-name="TableCell85" table:number-columns-spanned="5">
            <text:p text:style-name="TableContents">Acknowledgment Number</text:p>
          </table:table-cell>
          <table:covered-table-cell/>
          <table:covered-table-cell/>
          <table:covered-table-cell/>
          <table:covered-table-cell/>
          <table:table-cell table:style-name="TableCell86">
            <text:p text:style-name="TableContents"/>
          </table:table-cell>
          <table:table-cell table:style-name="TableCell87" table:number-columns-spanned="2">
            <text:p text:style-name="TableContents"/>
          </table:table-cell>
          <table:covered-table-cell/>
        </table:table-row>
        <table:table-row table:style-name="TableRow88">
          <table:table-cell table:style-name="TableCell89">
            <text:p text:style-name="TableContents">Offset</text:p>
          </table:table-cell>
          <table:table-cell table:style-name="TableCell90" table:number-columns-spanned="2">
            <text:p text:style-name="TableContents">Misc. Reserved</text:p>
          </table:table-cell>
          <table:covered-table-cell/>
          <table:table-cell table:style-name="TableCell91" table:number-columns-spanned="2">
            <text:p text:style-name="TableContents">Window</text:p>
          </table:table-cell>
          <table:covered-table-cell/>
          <table:table-cell table:style-name="TableCell92">
            <text:p text:style-name="TableContents"/>
          </table:table-cell>
          <table:table-cell table:style-name="TableCell93" table:number-columns-spanned="2">
            <text:p text:style-name="TableContents"/>
          </table:table-cell>
          <table:covered-table-cell/>
        </table:table-row>
        <table:table-row table:style-name="TableRow94">
          <table:table-cell table:style-name="TableCell95" table:number-columns-spanned="3">
            <text:p text:style-name="TableContents">Checksum</text:p>
          </table:table-cell>
          <table:covered-table-cell/>
          <table:covered-table-cell/>
          <table:table-cell table:style-name="TableCell96" table:number-columns-spanned="2">
            <text:p text:style-name="TableContents">Urgent Pointer</text:p>
          </table:table-cell>
          <table:covered-table-cell/>
          <table:table-cell table:style-name="TableCell97">
            <text:p text:style-name="TableContents"/>
          </table:table-cell>
          <table:table-cell table:style-name="TableCell98" table:number-columns-spanned="2">
            <text:p text:style-name="TableContents"/>
          </table:table-cell>
          <table:covered-table-cell/>
        </table:table-row>
      </table:table>
      <text:p text:style-name="PreformattedText"><draw:custom-shape svg:x="-0.1875in" svg:y="0.44145in" svg:width="0.55in" svg:height="0.28333in" draw:z-index="251663360" draw:id="id4" draw:style-name="a4" draw:name="Freeform: Shape 6" text:anchor-type="paragraph"><svg:title/><svg:desc/><draw:enhanced-geometry draw:type="non-primitive" svg:viewBox="0 0 502920 259305" draw:enhanced-path="M 220980 198 C 191770 -1072 195259 4009 182880 7818 164020 13621 113728 31988 91440 45918 80670 52649 71120 61158 60960 68778 50800 86558 39638 103802 30480 122118 19877 143324 7113 184600 0 205938 2540 221178 -1360 239086 7620 251658 13707 260180 27627 259278 38100 259278 81355 259278 124460 254198 167640 251658 180340 246578 192764 240743 205740 236418 215675 233106 226594 232923 236220 228798 244638 225190 249974 214534 259080 213558 322269 206788 386080 208478 449580 205938 462620 201591 486859 195739 495300 183078 501109 174364 500380 162758 502920 152598 497840 139898 495630 125629 487680 114498 482357 107046 471296 105734 464820 99258 458344 92782 456056 82874 449580 76398 440600 67418 428658 61901 419100 53538 408287 44076 400804 30673 388620 23058 379739 17507 368605 15840 358140 15438 302301 13290 250190 1468 220980 198 Z N" draw:text-areas="?f86 ?f88 ?f87 ?f89" draw:glue-points="?f47 ?f48 ?f49 ?f50 ?f51 ?f52 ?f53 ?f54 ?f55 ?f56 ?f57 ?f58 ?f59 ?f60 ?f61 ?f62 ?f63 ?f60 ?f64 ?f65 ?f66 ?f67 ?f68 ?f69 ?f70 ?f58 ?f71 ?f72 ?f73 ?f74 ?f75 ?f76 ?f77 ?f78 ?f70 ?f79 ?f80 ?f81 ?f82 ?f83 ?f84 ?f85 ?f47 ?f48"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920"/><draw:equation draw:name="f7" draw:formula="?f4 / 259305"/><draw:equation draw:name="f8" draw:formula="220980 * ?f5 / 502920"/><draw:equation draw:name="f9" draw:formula="198 * ?f4 / 259305"/><draw:equation draw:name="f10" draw:formula="182880 * ?f5 / 502920"/><draw:equation draw:name="f11" draw:formula="7818 * ?f4 / 259305"/><draw:equation draw:name="f12" draw:formula="91440 * ?f5 / 502920"/><draw:equation draw:name="f13" draw:formula="45918 * ?f4 / 259305"/><draw:equation draw:name="f14" draw:formula="60960 * ?f5 / 502920"/><draw:equation draw:name="f15" draw:formula="68778 * ?f4 / 259305"/><draw:equation draw:name="f16" draw:formula="30480 * ?f5 / 502920"/><draw:equation draw:name="f17" draw:formula="122118 * ?f4 / 259305"/><draw:equation draw:name="f18" draw:formula="0 * ?f5 / 502920"/><draw:equation draw:name="f19" draw:formula="205938 * ?f4 / 259305"/><draw:equation draw:name="f20" draw:formula="7620 * ?f5 / 502920"/><draw:equation draw:name="f21" draw:formula="251658 * ?f4 / 259305"/><draw:equation draw:name="f22" draw:formula="38100 * ?f5 / 502920"/><draw:equation draw:name="f23" draw:formula="259278 * ?f4 / 259305"/><draw:equation draw:name="f24" draw:formula="167640 * ?f5 / 502920"/><draw:equation draw:name="f25" draw:formula="205740 * ?f5 / 502920"/><draw:equation draw:name="f26" draw:formula="236418 * ?f4 / 259305"/><draw:equation draw:name="f27" draw:formula="236220 * ?f5 / 502920"/><draw:equation draw:name="f28" draw:formula="228798 * ?f4 / 259305"/><draw:equation draw:name="f29" draw:formula="259080 * ?f5 / 502920"/><draw:equation draw:name="f30" draw:formula="213558 * ?f4 / 259305"/><draw:equation draw:name="f31" draw:formula="449580 * ?f5 / 502920"/><draw:equation draw:name="f32" draw:formula="495300 * ?f5 / 502920"/><draw:equation draw:name="f33" draw:formula="183078 * ?f4 / 259305"/><draw:equation draw:name="f34" draw:formula="502920 * ?f5 / 502920"/><draw:equation draw:name="f35" draw:formula="152598 * ?f4 / 259305"/><draw:equation draw:name="f36" draw:formula="487680 * ?f5 / 502920"/><draw:equation draw:name="f37" draw:formula="114498 * ?f4 / 259305"/><draw:equation draw:name="f38" draw:formula="464820 * ?f5 / 502920"/><draw:equation draw:name="f39" draw:formula="99258 * ?f4 / 259305"/><draw:equation draw:name="f40" draw:formula="76398 * ?f4 / 259305"/><draw:equation draw:name="f41" draw:formula="419100 * ?f5 / 502920"/><draw:equation draw:name="f42" draw:formula="53538 * ?f4 / 259305"/><draw:equation draw:name="f43" draw:formula="388620 * ?f5 / 502920"/><draw:equation draw:name="f44" draw:formula="23058 * ?f4 / 259305"/><draw:equation draw:name="f45" draw:formula="358140 * ?f5 / 502920"/><draw:equation draw:name="f46" draw:formula="15438 * ?f4 / 259305"/><draw:equation draw:name="f47" draw:formula="?f8 / ?f6"/><draw:equation draw:name="f48" draw:formula="?f9 / ?f7"/><draw:equation draw:name="f49" draw:formula="?f10 / ?f6"/><draw:equation draw:name="f50" draw:formula="?f11 / ?f7"/><draw:equation draw:name="f51" draw:formula="?f12 / ?f6"/><draw:equation draw:name="f52" draw:formula="?f13 / ?f7"/><draw:equation draw:name="f53" draw:formula="?f14 / ?f6"/><draw:equation draw:name="f54" draw:formula="?f15 / ?f7"/><draw:equation draw:name="f55" draw:formula="?f16 / ?f6"/><draw:equation draw:name="f56" draw:formula="?f17 / ?f7"/><draw:equation draw:name="f57" draw:formula="?f18 / ?f6"/><draw:equation draw:name="f58" draw:formula="?f19 / ?f7"/><draw:equation draw:name="f59" draw:formula="?f20 / ?f6"/><draw:equation draw:name="f60" draw:formula="?f21 / ?f7"/><draw:equation draw:name="f61" draw:formula="?f22 / ?f6"/><draw:equation draw:name="f62" draw:formula="?f23 / ?f7"/><draw:equation draw:name="f63" draw:formula="?f24 / ?f6"/><draw:equation draw:name="f64" draw:formula="?f25 / ?f6"/><draw:equation draw:name="f65" draw:formula="?f26 / ?f7"/><draw:equation draw:name="f66" draw:formula="?f27 / ?f6"/><draw:equation draw:name="f67" draw:formula="?f28 / ?f7"/><draw:equation draw:name="f68" draw:formula="?f29 / ?f6"/><draw:equation draw:name="f69" draw:formula="?f30 / ?f7"/><draw:equation draw:name="f70" draw:formula="?f31 / ?f6"/><draw:equation draw:name="f71" draw:formula="?f32 / ?f6"/><draw:equation draw:name="f72" draw:formula="?f33 / ?f7"/><draw:equation draw:name="f73" draw:formula="?f34 / ?f6"/><draw:equation draw:name="f74" draw:formula="?f35 / ?f7"/><draw:equation draw:name="f75" draw:formula="?f36 / ?f6"/><draw:equation draw:name="f76" draw:formula="?f37 / ?f7"/><draw:equation draw:name="f77" draw:formula="?f38 / ?f6"/><draw:equation draw:name="f78" draw:formula="?f39 / ?f7"/><draw:equation draw:name="f79" draw:formula="?f40 / ?f7"/><draw:equation draw:name="f80" draw:formula="?f41 / ?f6"/><draw:equation draw:name="f81" draw:formula="?f42 / ?f7"/><draw:equation draw:name="f82" draw:formula="?f43 / ?f6"/><draw:equation draw:name="f83" draw:formula="?f44 / ?f7"/><draw:equation draw:name="f84" draw:formula="?f45 / ?f6"/><draw:equation draw:name="f85" draw:formula="?f46 / ?f7"/><draw:equation draw:name="f86" draw:formula="?f0 / ?f6"/><draw:equation draw:name="f87" draw:formula="?f1 / ?f6"/><draw:equation draw:name="f88" draw:formula="?f2 / ?f7"/><draw:equation draw:name="f89" draw:formula="?f3 / ?f7"/></draw:enhanced-geometry></draw:custom-shape><text:line-break/><text:span text:style-name="T99">The data then contained follows</text:span><text:line-break/></text:p>
      <text:p text:style-name="PreformattedText">HTTP/1.1 304 Not Modified</text:p>
      <text:p text:style-name="PreformattedText">Date: Thu, 09 Jan 2025 20:29:12 GMT</text:p>
      <text:p text:style-name="PreformattedText"><draw:connector draw:type="line" svg:x1="1.9125in" svg:y1="0.16875in" svg:x2="2.17917in" svg:y2="0.17708in" draw:z-index="251666432" draw:id="id5" draw:style-name="a5" draw:name="Straight Connector 9" text:anchor-type="paragraph"><svg:title/><svg:desc/></draw:connector><draw:connector draw:type="line" svg:x1="0.44583in" svg:y1="0.16042in" svg:x2="0.87083in" svg:y2="0.16875in" draw:z-index="251664384" draw:id="id6" draw:style-name="a6" draw:name="Straight Connector 7" text:anchor-type="paragraph"><svg:title/><svg:desc/></draw:connector>Server: Apache/2.4.62 (Unix) OpenSSL/1.1.1zb PHP/8.1.27</text:p>
      <text:p text:style-name="PreformattedText">Last-Modified: Sat, 13 Aug 2022 00:48:55 GMT</text:p>
      <text:p text:style-name="PreformattedText">ETag: ""</text:p>
      <text:p text:style-name="PreformattedText">Accept-Ranges: bytes</text:p>
      <text:p text:style-name="PreformattedText">Keep-Alive: timeout=5, max=100</text:p>
      <text:p text:style-name="PreformattedText">Connection: Keep-Alive</text:p>
      <text:p text:style-name="HorizontalLine"/>
      <text:p text:style-name="PreformattedText"><draw:connector draw:type="line" svg:x1="3.1375in" svg:y1="0.61806in" svg:x2="3.50417in" svg:y2="0.61806in" draw:z-index="251667456" draw:id="id7" draw:style-name="a7" draw:name="Straight Connector 10" text:anchor-type="paragraph"><svg:title/><svg:desc/></draw:connector><draw:connector draw:type="line" svg:x1="3.7625in" svg:y1="0.45139in" svg:x2="4.12917in" svg:y2="0.45972in" draw:z-index="251665408" draw:id="id8" draw:style-name="a8" draw:name="Straight Connector 8" text:anchor-type="paragraph"><svg:title/><svg:desc/></draw:connector>1) Circle the Source and Destination Address of the packets above.<text:line-break/>2) Circle the protocol used? What does this acronym stand for?<text:s/><text:span text:style-name="T100">HyperText Transfer Protocol</text:span><text:line-break/>3) What type of server responded to the request? Underline this.<text:s/><text:line-break/>4) What type of encryption was used? Underline this.<text:line-break/>5) What (if any) other information is provided by the server description.<text:s/><text:span text:style-name="T101">Shows when it was last modified</text:span></text:p>
      <text:p text:style-name="PreformattedText">5) What does 304 mean in this context?<text:s/><text:span text:style-name="T102">R</text:span><text:span text:style-name="T103">equest source has not been modified since last time loaded</text:span><text:line-break/>6) What would 404 mean instead?<text:s/><text:span text:style-name="T104">Server could not find the requested pag</text:span><text:line-break/>7) Find another HTTP response status code that you think is interesting, and describe it.<text:line-break/></text:p>
      <text:p text:style-name="P105">403 – Forbidden<text:s/></text:p>
      <text:p text:style-name="P106">Request contained data that was understood by the server, but server refuses action.<text:s/>Could be due to user not having necessary permissions or attempting a prohibited action. I like this because I enjoy the security side of IT.<text:s/></text:p>
      <text:p text:style-name="PreformattedText"><text:line-break/>https://en.wikipedia.org/wiki/List_of_HTTP_status_cod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Bryan</meta:initial-creator>
    <dc:creator>Bryan Ilich</dc:creator>
    <meta:creation-date>2025-01-18T01:43:00Z</meta:creation-date>
    <dc:date>2025-01-18T01:43:00Z</dc:date>
    <meta:template xlink:href="Normal" xlink:type="simple"/>
    <meta:editing-cycles>2</meta:editing-cycles>
    <meta:editing-duration>PT420S</meta:editing-duration>
    <meta:document-statistic meta:page-count="1" meta:paragraph-count="3" meta:word-count="266" meta:character-count="1784" meta:row-count="12" meta:non-whitespace-character-count="1521"/>
  </office:meta>
</office:document-meta>
</file>